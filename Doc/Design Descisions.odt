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ad46" officeooo:paragraph-rsid="0016ad46"/>
    </style:style>
    <style:style style:name="P2" style:family="paragraph" style:parent-style-name="Standard">
      <style:text-properties officeooo:rsid="00179b09" officeooo:paragraph-rsid="00179b09"/>
    </style:style>
    <style:style style:name="P3" style:family="paragraph" style:parent-style-name="Heading_20_1">
      <style:text-properties officeooo:rsid="0019b8be" officeooo:paragraph-rsid="0019b8be"/>
    </style:style>
    <style:style style:name="P4" style:family="paragraph" style:parent-style-name="Text_20_body">
      <style:text-properties officeooo:rsid="0019b8be" officeooo:paragraph-rsid="0019b8be"/>
    </style:style>
    <style:style style:name="P5" style:family="paragraph" style:parent-style-name="Text_20_body">
      <style:text-properties officeooo:rsid="001b9157" officeooo:paragraph-rsid="001b9157"/>
    </style:style>
    <style:style style:name="P6" style:family="paragraph" style:parent-style-name="Heading_20_1">
      <style:text-properties officeooo:rsid="001cc031" officeooo:paragraph-rsid="001cc031"/>
    </style:style>
    <style:style style:name="P7" style:family="paragraph" style:parent-style-name="Text_20_body">
      <style:text-properties officeooo:rsid="001cc031" officeooo:paragraph-rsid="001cc031"/>
    </style:style>
    <style:style style:name="P8" style:family="paragraph" style:parent-style-name="Text_20_body">
      <style:text-properties officeooo:rsid="001cc031" officeooo:paragraph-rsid="001d202f"/>
    </style:style>
    <style:style style:name="P9" style:family="paragraph" style:parent-style-name="Text_20_body">
      <style:text-properties officeooo:rsid="001d202f" officeooo:paragraph-rsid="001d202f"/>
    </style:style>
    <style:style style:name="T1" style:family="text">
      <style:text-properties officeooo:rsid="00179b09"/>
    </style:style>
    <style:style style:name="T2" style:family="text">
      <style:text-properties officeooo:rsid="00189b1e"/>
    </style:style>
    <style:style style:name="T3" style:family="text">
      <style:text-properties fo:font-variant="normal" fo:text-transform="none" fo:color="#f0f6fc" loext:opacity="100%" fo:font-family="apple-system, BlinkMacSystemFont, 'Segoe UI', 'Noto Sans', Helvetica, Arial, sans-serif, 'Apple Color Emoji', 'Segoe UI Emoji'" fo:font-size="10.5pt" fo:letter-spacing="normal" fo:font-style="normal" fo:font-weight="normal"/>
    </style:style>
    <style:style style:name="T4" style:family="text">
      <style:text-properties officeooo:rsid="001d20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ant my Web Layer and my Service Layer to be decoupled, so I split them into different projects <text:span text:style-name="T1">so I could pretend to be two different developers (separation of concerns). One on the web layer and one on the service layer.</text:span></text:p>
      <text:p text:style-name="P1"/>
      <text:p text:style-name="P2">The service layer has unit tests to ensure it works correctly <text:span text:style-name="T2">(crud operations and such) while the web layer can use mocks to ensure it presents and interacts with the data/service correctly.</text:span></text:p>
      <text:p text:style-name="P2"/>
      <text:h text:style-name="P3" text:outline-level="1">Overposting</text:h>
      <text:p text:style-name="P4">I am not worried about overposting as my service will not allow inserting of certain parameters, choosing to not bind certain parameters from http requests would just lead to data not being “received” and I would have to manually add each new field I add to the model. It’s not the job of the controller to enforce business logic anyway.</text:p>
      <text:p text:style-name="P4"/>
      <text:h text:style-name="Heading_20_1" text:outline-level="1">Move entire solution into single project</text:h>
      <text:p text:style-name="P4"><text:span text:style-name="T3">Having Web, Db and Unit testing projects adds pointless complications, extra namespaces for no real utility.</text:span><text:line-break/><text:span text:style-name="T3">I am not going to use my "service" with a different frontend, I only split it into a service to allow for easy unit testing.</text:span></text:p>
      <text:p text:style-name="P5">It turns out the unit testing project should still be in it’s own project, that is okay I will just merge the web layer with the service layer and the unit tests should work fine.</text:p>
      <text:p text:style-name="P5"/>
      <text:p text:style-name="P5"/>
      <text:h text:style-name="P6" text:outline-level="1">26/03/2026</text:h>
      <text:p text:style-name="P7">I have been experimenting with loading images asynchronously for when I produce shopping list reports. Going to clean up the code I was using and put it in.</text:p>
      <text:p text:style-name="P7"/>
      <text:p text:style-name="P8">The spinner gif i<text:span text:style-name="T4">s 1/6th of the filesize of the large image. I will need to get a smaller spinner because slows the page down a bit too much for my liking.</text:span></text:p>
      <text:p text:style-name="P9"/>
      <text:p text:style-name="P9">Also, vite adds a small overhead to the download, I “blocked” the request when testing and it’s fast enough.</text:p>
      <text:p text:style-name="P9">I have been testing the page on “Slow 4G”, I want the page load itself to be 2 seconds max and it to slowly download the heavy files in the backgr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19:23:20.152478100</meta:creation-date>
    <dc:date>2026-03-26T19:47:14.631647600</dc:date>
    <meta:editing-duration>PT24M29S</meta:editing-duration>
    <meta:editing-cycles>10</meta:editing-cycles>
    <meta:generator>LibreOffice/25.8.4.2$Windows_X86_64 LibreOffice_project/290daaa01b999472f0c7a3890eb6a550fd74c6df</meta:generator>
    <meta:document-statistic meta:table-count="0" meta:image-count="0" meta:object-count="0" meta:page-count="1" meta:paragraph-count="12" meta:word-count="328" meta:character-count="1795" meta:non-whitespace-character-count="1479"/>
  </office:meta>
</office:document-meta>
</file>