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d46" officeooo:paragraph-rsid="0016ad46"/>
    </style:style>
    <style:style style:name="P2" style:family="paragraph" style:parent-style-name="Standard">
      <style:text-properties officeooo:rsid="00179b09" officeooo:paragraph-rsid="00179b09"/>
    </style:style>
    <style:style style:name="T1" style:family="text">
      <style:text-properties officeooo:rsid="00179b09"/>
    </style:style>
    <style:style style:name="T2" style:family="text">
      <style:text-properties officeooo:rsid="00189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ant my Web Layer and my Service Layer to be decoupled, so I split them into different projects <text:span text:style-name="T1">so I could pretend to be two different developers (separation of concerns). One on the web layer and one on the service layer.</text:span></text:p>
      <text:p text:style-name="P1"/>
      <text:p text:style-name="P2">The service layer has unit tests to ensure it works correctly <text:span text:style-name="T2">(crud operations and such) while the web layer can use mocks to ensure it presents and interacts with the data/service correctl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9:23:20.152478100</meta:creation-date>
    <dc:date>2026-03-19T19:27:02.695219000</dc:date>
    <meta:editing-duration>PT3M41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2" meta:word-count="74" meta:character-count="415" meta:non-whitespace-character-count="343"/>
  </office:meta>
</office:document-meta>
</file>