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d46" officeooo:paragraph-rsid="0016ad46"/>
    </style:style>
    <style:style style:name="P2" style:family="paragraph" style:parent-style-name="Standard">
      <style:text-properties officeooo:rsid="00179b09" officeooo:paragraph-rsid="00179b09"/>
    </style:style>
    <style:style style:name="P3" style:family="paragraph" style:parent-style-name="Heading_20_1">
      <style:text-properties officeooo:rsid="0019b8be" officeooo:paragraph-rsid="0019b8be"/>
    </style:style>
    <style:style style:name="P4" style:family="paragraph" style:parent-style-name="Text_20_body">
      <style:text-properties officeooo:rsid="0019b8be" officeooo:paragraph-rsid="0019b8be"/>
    </style:style>
    <style:style style:name="T1" style:family="text">
      <style:text-properties officeooo:rsid="00179b09"/>
    </style:style>
    <style:style style:name="T2" style:family="text">
      <style:text-properties officeooo:rsid="00189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my Web Layer and my Service Layer to be decoupled, so I split them into different projects <text:span text:style-name="T1">so I could pretend to be two different developers (separation of concerns). One on the web layer and one on the service layer.</text:span></text:p>
      <text:p text:style-name="P1"/>
      <text:p text:style-name="P2">The service layer has unit tests to ensure it works correctly <text:span text:style-name="T2">(crud operations and such) while the web layer can use mocks to ensure it presents and interacts with the data/service correctly.</text:span></text:p>
      <text:p text:style-name="P2"/>
      <text:h text:style-name="P3" text:outline-level="1">Overposting</text:h>
      <text:p text:style-name="P4">I am not worried about overposting as my service will not allow inserting of certain parameters, choosing to not bind certain parameters from http requests would just lead to data not being “received” and I would have to manually add each new field I add to the model. It’s not the job of the controller to enforce business logic anyway.</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23:20.152478100</meta:creation-date>
    <dc:date>2026-03-21T19:06:38.599021300</dc:date>
    <meta:editing-duration>PT6M46S</meta:editing-duration>
    <meta:editing-cycles>5</meta:editing-cycles>
    <meta:generator>LibreOffice/25.8.4.2$Windows_X86_64 LibreOffice_project/290daaa01b999472f0c7a3890eb6a550fd74c6df</meta:generator>
    <meta:document-statistic meta:table-count="0" meta:image-count="0" meta:object-count="0" meta:page-count="1" meta:paragraph-count="4" meta:word-count="135" meta:character-count="763" meta:non-whitespace-character-count="632"/>
  </office:meta>
</office:document-meta>
</file>